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3ef1"/>
    </style:style>
    <style:style style:name="P9" style:family="paragraph" style:parent-style-name="Standard">
      <style:paragraph-properties fo:text-align="start" style:justify-single-word="false"/>
      <style:text-properties officeooo:rsid="00173bf9" officeooo:paragraph-rsid="0026b84f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6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7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18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20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1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2" style:family="paragraph" style:parent-style-name="Standard">
      <style:paragraph-properties fo:text-align="start" style:justify-single-word="false"/>
      <style:text-properties officeooo:rsid="002f7a7d" officeooo:paragraph-rsid="002f7a7d"/>
    </style:style>
    <style:style style:name="P23" style:family="paragraph" style:parent-style-name="Standard">
      <style:paragraph-properties fo:text-align="start" style:justify-single-word="false"/>
      <style:text-properties officeooo:rsid="00447da1" officeooo:paragraph-rsid="00447da1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1c6bc9" officeooo:paragraph-rsid="00447da1"/>
    </style:style>
    <style:style style:name="P25" style:family="paragraph" style:parent-style-name="Standard">
      <style:paragraph-properties fo:text-align="start" style:justify-single-word="false"/>
      <style:text-properties officeooo:rsid="004d7cac" officeooo:paragraph-rsid="004d7cac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73bf9" officeooo:paragraph-rsid="004d7cac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73bf9" officeooo:paragraph-rsid="00352b5a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73bf9" officeooo:paragraph-rsid="0033ad67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73bf9" officeooo:paragraph-rsid="0043ef9a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73bf9" officeooo:paragraph-rsid="0052fe58"/>
    </style:style>
    <style:style style:name="P38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39" style:family="paragraph" style:parent-style-name="Standard">
      <style:paragraph-properties fo:text-align="start" style:justify-single-word="false"/>
      <style:text-properties officeooo:rsid="00173bf9" officeooo:paragraph-rsid="0052fe58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1c6bc9" officeooo:paragraph-rsid="00447da1"/>
    </style:style>
    <style:style style:name="P41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P42" style:family="paragraph" style:parent-style-name="Standard">
      <style:paragraph-properties fo:text-align="start" style:justify-single-word="false"/>
      <style:text-properties officeooo:rsid="0052fe58" officeooo:paragraph-rsid="0052fe58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style:style style:name="T7" style:family="text">
      <style:text-properties officeooo:rsid="00391149"/>
    </style:style>
    <style:style style:name="T8" style:family="text">
      <style:text-properties officeooo:rsid="004b5c8f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10">Design <text:span text:style-name="T2">Planning</text:span></text:p>
      <text:p text:style-name="P12">What has been done before</text:p>
      <text:list text:style-name="L1">
        <text:list-item>
          <text:p text:style-name="P26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26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26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26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26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26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26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26"><text:a xlink:type="simple" xlink:href="https://github.com/Dizzerin/Software-Defined-Radio" text:style-name="Internet_20_link" text:visited-style-name="Visited_20_Internet_20_Link">https://github.com/Dizzerin/Software-Defined-Radio</text:a></text:p>
        </text:list-item>
        <text:list-item>
          <text:p text:style-name="P26"><text:a xlink:type="simple" xlink:href="https://github.com/dawsonjon/PicoRX" text:style-name="Internet_20_link" text:visited-style-name="Visited_20_Internet_20_Link">https://github.com/dawsonjon/PicoRX</text:a></text:p>
        </text:list-item>
        <text:list-item>
          <text:p text:style-name="P26"><text:a xlink:type="simple" xlink:href="https://github.com/froeca/Software-Defined-Radio" text:style-name="Internet_20_link" text:visited-style-name="Visited_20_Internet_20_Link">https://github.com/froeca/Software-Defined-Radio</text:a></text:p>
        </text:list-item>
        <text:list-item>
          <text:p text:style-name="P26"><text:a xlink:type="simple" xlink:href="https://github.com/frohro/IQ_SDR/tree/master/Receiver/IQ_SDR" text:style-name="Internet_20_link" text:visited-style-name="Visited_20_Internet_20_Link">https://github.com/frohro/IQ_SDR/tree/master/Receiver/IQ_SDR</text:a></text:p>
        </text:list-item>
        <text:list-item>
          <text:p text:style-name="P26"><text:a xlink:type="simple" xlink:href="https://github.com/sharebrained/portapack-hackrf" text:style-name="Internet_20_link" text:visited-style-name="Visited_20_Internet_20_Link">https://github.com/sharebrained/portapack-hackrf</text:a></text:p>
        </text:list-item>
        <text:list-item>
          <text:p text:style-name="P26"><text:a xlink:type="simple" xlink:href="https://github.com/softerhardware/Hermes-Lite2/blob/master/hardware/hl/releases/hl2p0build9/hermeslite.pdf" text:style-name="Internet_20_link" text:visited-style-name="Visited_20_Internet_20_Link">https://github.com/softerhardware/Hermes-Lite2/blob/master/hardware/hl/releases/hl2p0build9/hermeslite.pdf</text:a></text:p>
        </text:list-item>
        <text:list-item>
          <text:p text:style-name="P26"><text:a xlink:type="simple" xlink:href="https://github.com/greatscottgadgets/hackrf" text:style-name="Internet_20_link" text:visited-style-name="Visited_20_Internet_20_Link">https://github.com/greatscottgadgets/hackrf</text:a></text:p>
        </text:list-item>
        <text:list-item>
          <text:p text:style-name="P26"><text:a xlink:type="simple" xlink:href="https://hackrf.readthedocs.io/en/latest/index.html" text:style-name="Internet_20_link" text:visited-style-name="Visited_20_Internet_20_Link">https://hackrf.readthedocs.io/en/latest/index.html</text:a></text:p>
        </text:list-item>
        <text:list-item>
          <text:p text:style-name="P26"><text:a xlink:type="simple" xlink:href="https://github.com/ArjanteMarvelde/uSDR-pico/tree/main/doc" text:style-name="Internet_20_link" text:visited-style-name="Visited_20_Internet_20_Link">https://github.com/ArjanteMarvelde/uSDR-pico/tree/main/doc</text:a></text:p>
        </text:list-item>
        <text:list-item>
          <text:p text:style-name="P26"><text:a xlink:type="simple" xlink:href="https://github.com/f4goh/SDR-PICO" text:style-name="Internet_20_link" text:visited-style-name="Visited_20_Internet_20_Link">https://github.com/f4goh/SDR-PICO</text:a></text:p>
        </text:list-item>
        <text:list-item>
          <text:p text:style-name="P26"><text:a xlink:type="simple" xlink:href="https://github.com/KolbyKriege/SDR_Receiver_ENGR357" text:style-name="Internet_20_link" text:visited-style-name="Visited_20_Internet_20_Link">https://github.com/KolbyKriege/SDR_Receiver_ENGR357</text:a></text:p>
        </text:list-item>
      </text:list>
      <text:p text:style-name="P3"/>
      <text:p text:style-name="P15">Theory</text:p>
      <text:list text:continue-numbering="true" text:style-name="L1">
        <text:list-item>
          <text:p text:style-name="P27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  <text:list-item>
          <text:p text:style-name="P27"><text:a xlink:type="simple" xlink:href="https://en.wikipedia.org/wiki/Low-noise_amplifier" text:style-name="Internet_20_link" text:visited-style-name="Visited_20_Internet_20_Link">https://en.wikipedia.org/wiki/Low-noise_amplifier</text:a></text:p>
        </text:list-item>
        <text:list-item>
          <text:p text:style-name="P27"><text:a xlink:type="simple" xlink:href="https://github.com/nilclass/rp-pico-pio-quad-clock" text:style-name="Internet_20_link" text:visited-style-name="Visited_20_Internet_20_Link">https://github.com/nilclass/rp-pico-pio-quad-clock</text:a></text:p>
        </text:list-item>
      </text:list>
      <text:p text:style-name="P7"/>
      <text:p text:style-name="P7"/>
      <text:p text:style-name="P12">How <text:span text:style-name="T3">different </text:span>SDRs work (Block Diagram)</text:p>
      <text:list text:continue-numbering="true" text:style-name="L1">
        <text:list-item>
          <text:p text:style-name="P28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28"><text:a xlink:type="simple" xlink:href="https://www.wimo.com/en/sdr" text:style-name="Internet_20_link" text:visited-style-name="Visited_20_Internet_20_Link">https://www.wimo.com/en/sdr</text:a></text:p>
        </text:list-item>
      </text:list>
      <text:p text:style-name="P4"/>
      <text:p text:style-name="P3"/>
      <text:p text:style-name="P13">Design Recommendations</text:p>
      <text:list text:continue-numbering="true" text:style-name="L1">
        <text:list-item>
          <text:p text:style-name="P29"/>
        </text:list-item>
      </text:list>
      <text:p text:style-name="P4"/>
      <text:p text:style-name="P3"/>
      <text:p text:style-name="P10">Hardware</text:p>
      <text:p text:style-name="P12">Capabilities/Trade-offs</text:p>
      <text:p text:style-name="P16">Bypass capacitors</text:p>
      <text:list text:continue-numbering="true" text:style-name="L1">
        <text:list-item>
          <text:p text:style-name="P29"/>
        </text:list-item>
      </text:list>
      <text:p text:style-name="P4"/>
      <text:p text:style-name="P25">OLED Display</text:p>
      <text:list text:continue-numbering="true" text:style-name="L1">
        <text:list-item>
          <text:p text:style-name="P30"><text:a xlink:type="simple" xlink:href="https://www.elecrow.com/i2c-096-oled-128x64-blueyellow-p-1086.html?gad_campaignid=23136944328" text:style-name="Internet_20_link" text:visited-style-name="Visited_20_Internet_20_Link">https://www.elecrow.com/i2c-096-oled-128x64-blueyellow-p-1086.html?gad_campaignid=23136944328</text:a></text:p>
        </text:list-item>
        <text:list-item>
          <text:p text:style-name="P30"><text:a xlink:type="simple" xlink:href="https://www.elecrow.com/download/SSD1306%20Datasheet.pdf" text:style-name="Internet_20_link" text:visited-style-name="Visited_20_Internet_20_Link">https://www.elecrow.com/download/SSD1306%20Datasheet.pdf</text:a></text:p>
        </text:list-item>
        <text:list-item>
          <text:p text:style-name="P30"/>
        </text:list-item>
      </text:list>
      <text:p text:style-name="P23"/>
      <text:p text:style-name="P23"><text:soft-page-break/>Analog to Digital Converter</text:p>
      <text:list text:continue-numbering="true" text:style-name="L1">
        <text:list-item>
          <text:p text:style-name="P40"><text:a xlink:type="simple" xlink:href="https://www.ti.com/lit/ds/symlink/pcm1808.pdf?ts=1777362780694" text:style-name="Internet_20_link" text:visited-style-name="Visited_20_Internet_20_Link">https://www.ti.com/lit/ds/symlink/pcm1808.pdf?ts=1777362780694</text:a></text:p>
        </text:list-item>
      </text:list>
      <text:p text:style-name="P24"/>
      <text:p text:style-name="P16">Band-pass Filters</text:p>
      <text:list text:continue-numbering="true" text:style-name="L1">
        <text:list-item>
          <text:p text:style-name="P29"/>
        </text:list-item>
      </text:list>
      <text:p text:style-name="P4"/>
      <text:p text:style-name="P16">Transformers (Ferrite Toroids)</text:p>
      <text:list text:continue-numbering="true" text:style-name="L1">
        <text:list-item>
          <text:p text:style-name="P29"><text:a xlink:type="simple" xlink:href="https://lodestonepacific.com/micrometals-iron-powder-cores/" text:style-name="Internet_20_link" text:visited-style-name="Visited_20_Internet_20_Link">https://lodestonepacific.com/micrometals-iron-powder-cores/</text:a></text:p>
        </text:list-item>
        <text:list-item>
          <text:p text:style-name="P29"/>
        </text:list-item>
      </text:list>
      <text:p text:style-name="P4"/>
      <text:p text:style-name="P16">External power/regulation</text:p>
      <text:list text:continue-numbering="true" text:style-name="L1">
        <text:list-item>
          <text:p text:style-name="P29"/>
        </text:list-item>
      </text:list>
      <text:p text:style-name="P4"/>
      <text:p text:style-name="P17">Rotary Encoder Frequency Tuning</text:p>
      <text:list text:continue-numbering="true" text:style-name="L1">
        <text:list-item>
          <text:p text:style-name="P29"/>
        </text:list-item>
      </text:list>
      <text:p text:style-name="P4"/>
      <text:p text:style-name="P17">External Sound Cards/<text:span text:style-name="T3">Speakers</text:span></text:p>
      <text:list text:continue-numbering="true" text:style-name="L1">
        <text:list-item>
          <text:p text:style-name="P29"/>
        </text:list-item>
      </text:list>
      <text:p text:style-name="P4"/>
      <text:p text:style-name="P42">Digital Isolator</text:p>
      <text:list text:continue-numbering="true" text:style-name="L1">
        <text:list-item>
          <text:p text:style-name="P37"><text:a xlink:type="simple" xlink:href="https://www.ti.com/lit/ds/symlink/iso7720.pdf" text:style-name="Internet_20_link" text:visited-style-name="Visited_20_Internet_20_Link">https://www.ti.com/lit/ds/symlink/iso7720.pdf</text:a></text:p>
        </text:list-item>
        <text:list-item>
          <text:p text:style-name="P37"><text:a xlink:type="simple" xlink:href="https://jlcpcb.com/partdetail/TexasInstruments-ISO7720DR/C486037" text:style-name="Internet_20_link" text:visited-style-name="Visited_20_Internet_20_Link">https://jlcpcb.com/partdetail/TexasInstruments-ISO7720DR/C486037</text:a></text:p>
        </text:list-item>
        <text:list-item>
          <text:p text:style-name="P37"/>
        </text:list-item>
      </text:list>
      <text:p text:style-name="P39"/>
      <text:p text:style-name="P17">Local Oscillators</text:p>
      <text:list text:continue-numbering="true" text:style-name="L1">
        <text:list-item>
          <text:p text:style-name="P29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29"><text:a xlink:type="simple" xlink:href="https://jlcpcb.com/partdetail/AbraconLLC-ASTX_H11_24_576MHZT/C1987701" text:style-name="Internet_20_link" text:visited-style-name="Visited_20_Internet_20_Link">https://jlcpcb.com/partdetail/AbraconLLC-ASTX_H11_24_576MHZT/C1987701</text:a></text:p>
        </text:list-item>
        <text:list-item>
          <text:p text:style-name="P29"><text:a xlink:type="simple" xlink:href="https://jlcpcb.com/partdetail/534662-49MD_24_576_20_10_10B/C518125" text:style-name="Internet_20_link" text:visited-style-name="Visited_20_Internet_20_Link">https://jlcpcb.com/partdetail/534662-49MD_24_576_20_10_10B/C518125</text:a></text:p>
        </text:list-item>
        <text:list-item>
          <text:p text:style-name="P29"><text:a xlink:type="simple" xlink:href="https://jlcpcb.com/partdetail/CTS_ElectronicComponents-ATS245A/C1669681" text:style-name="Internet_20_link" text:visited-style-name="Visited_20_Internet_20_Link">https://jlcpcb.com/partdetail/CTS_ElectronicComponents-ATS245A/C1669681</text:a> <text:span text:style-name="T8">*$8.94 and out of stock</text:span></text:p>
        </text:list-item>
        <text:list-item>
          <text:p text:style-name="P29"><text:a xlink:type="simple" xlink:href="https://abracon.com/datasheets/ATX-H11.pdf" text:style-name="Internet_20_link" text:visited-style-name="Visited_20_Internet_20_Link">https://abracon.com/datasheets/ATX-H11.pdf</text:a></text:p>
        </text:list-item>
      </text:list>
      <text:p text:style-name="P4"/>
      <text:p text:style-name="P17">Mixers</text:p>
      <text:list text:continue-numbering="true" text:style-name="L1">
        <text:list-item>
          <text:p text:style-name="P29"><text:a xlink:type="simple" xlink:href="https://www.ti.com/lit/ds/symlink/sn74cbt3253c.pdf" text:style-name="Internet_20_link" text:visited-style-name="Visited_20_Internet_20_Link">https://www.ti.com/lit/ds/symlink/sn74cbt3253c.pdf</text:a></text:p>
        </text:list-item>
        <text:list-item>
          <text:p text:style-name="P29"/>
        </text:list-item>
      </text:list>
      <text:p text:style-name="P4"/>
      <text:p text:style-name="P17">Amplifiers</text:p>
      <text:list text:continue-numbering="true" text:style-name="L1">
        <text:list-item>
          <text:p text:style-name="P29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29"><text:a xlink:type="simple" xlink:href="https://www.analog.com/en/products/lt6231.html" text:style-name="Internet_20_link" text:visited-style-name="Visited_20_Internet_20_Link">https://www.analog.com/en/products/lt6231.html</text:a></text:p>
        </text:list-item>
      </text:list>
      <text:p text:style-name="P4"><text:tab/><text:span text:style-name="T7">Low-Noise Amplifer (JFET?)</text:span></text:p>
      <text:list text:continue-numbering="true" text:style-name="L1">
        <text:list-item>
          <text:p text:style-name="P29"><text:a xlink:type="simple" xlink:href="https://www.ti.com/lit/ds/symlink/opa1611.pdf?HQS=dis-dk-null-digikeymode-dsf-pf-null-wwe&amp;ts=1777570997919&amp;ref_url=https%253A%252F%252Fwww.ti.com%252Fgeneral%252Fdocs%252Fsuppproductinfo.tsp%253FdistId%253D10%2526gotoUrl%253Dhttps%253A%252F%252Fwww.ti.com%252Flit%252Fgpn%252Fopa1611" text:style-name="Internet_20_link" text:visited-style-name="Visited_20_Internet_20_Link">https://www.ti.com/lit/ds/symlink/opa1611.pdf?HQS=dis-dk-null-digikeymode-dsf-pf-null-wwe&amp;ts=1777570997919&amp;ref_url=https%253A%252F%252Fwww.ti.com%252Fgeneral%252Fdocs%252Fsuppproductinfo.tsp%253FdistId%253D10%2526gotoUrl%253Dhttps%253A%252F%252Fwww.ti.com%252Flit%252Fgpn%252Fopa1611</text:a></text:p>
        </text:list-item>
        <text:list-item>
          <text:p text:style-name="P29"><text:a xlink:type="simple" xlink:href="https://www.ti.com/lit/ds/symlink/opa1611.pdf" text:style-name="Internet_20_link" text:visited-style-name="Visited_20_Internet_20_Link">https://www.ti.com/lit/ds/symlink/opa1611.pdf</text:a></text:p>
        </text:list-item>
        <text:list-item>
          <text:p text:style-name="P29"/>
        </text:list-item>
      </text:list>
      <text:p text:style-name="P4"/>
      <text:p text:style-name="P17">Low-Pass Filters for Audio</text:p>
      <text:list text:continue-numbering="true" text:style-name="L1">
        <text:list-item>
          <text:p text:style-name="P29"><text:s text:c="2"/></text:p>
        </text:list-item>
        <text:list-item>
          <text:p text:style-name="P29"><text:soft-page-break/></text:p>
        </text:list-item>
      </text:list>
      <text:p text:style-name="P4"/>
      <text:p text:style-name="P20">Batteries</text:p>
      <text:list text:continue-numbering="true" text:style-name="L1">
        <text:list-item>
          <text:p text:style-name="P31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31"><text:a xlink:type="simple" xlink:href="https://www.te.com/commerce/DocumentDelivery/DDEController?Action=srchrtrv&amp;DocNm=BAT-HLD-012-SMT&amp;DocType=Data+Sheet&amp;DocLang=English&amp;DocFormat=pdf&amp;PartCntxt=BAT-HLD-012-SMT" text:style-name="Internet_20_link" text:visited-style-name="Visited_20_Internet_20_Link">https://www.te.com/commerce/DocumentDelivery/DDEController?Action=srchrtrv&amp;DocNm=BAT-HLD-012-SMT&amp;DocType=Data+Sheet&amp;DocLang=English&amp;DocFormat=pdf&amp;PartCntxt=BAT-HLD-012-SMT</text:a></text:p>
        </text:list-item>
        <text:list-item>
          <text:p text:style-name="P31"><text:a xlink:type="simple" xlink:href="https://www.digikey.com/en/products/detail/te-connectivity-linx/BAT-HLD-012-SMT/3044013" text:style-name="Internet_20_link" text:visited-style-name="Visited_20_Internet_20_Link">https://www.digikey.com/en/products/detail/te-connectivity-linx/BAT-HLD-012-SMT/3044013</text:a></text:p>
        </text:list-item>
        <text:list-item>
          <text:p text:style-name="P31"/>
        </text:list-item>
      </text:list>
      <text:p text:style-name="P16"/>
      <text:p text:style-name="P20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31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31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31"><text:a xlink:type="simple" xlink:href="https://product.torexsemi.com/system/files/series/xc6206.pdf" text:style-name="Internet_20_link" text:visited-style-name="Visited_20_Internet_20_Link">https://product.torexsemi.com/system/files/series/xc6206.pdf</text:a></text:p>
        </text:list-item>
      </text:list>
      <text:p text:style-name="P8"/>
      <text:p text:style-name="P21">Microprocessor</text:p>
      <text:list text:continue-numbering="true" text:style-name="L1">
        <text:list-item>
          <text:p text:style-name="P32"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  <text:list-item>
          <text:p text:style-name="P32"><text:a xlink:type="simple" xlink:href="https://pip-assets.raspberrypi.com/categories/610-raspberry-pi-pico/documents/RP-008307-DS-1-pico-datasheet.pdf?disposition=inline" text:style-name="Internet_20_link" text:visited-style-name="Visited_20_Internet_20_Link">https://pip-assets.raspberrypi.com/categories/610-raspberry-pi-pico/documents/RP-008307-DS-1-pico-datasheet.pdf?disposition=inline</text:a></text:p>
        </text:list-item>
        <text:list-item>
          <text:p text:style-name="P32"/>
        </text:list-item>
      </text:list>
      <text:p text:style-name="P9"/>
      <text:p text:style-name="P22">Switches/Buttons</text:p>
      <text:list text:continue-numbering="true" text:style-name="L1">
        <text:list-item>
          <text:p text:style-name="P32"><text:a xlink:type="simple" xlink:href="https://mm.digikey.com/Volume0/opasdata/d220001/medias/docus/496/series1k2_201004.pdf" text:style-name="Internet_20_link" text:visited-style-name="Visited_20_Internet_20_Link">https://mm.digikey.com/Volume0/opasdata/d220001/medias/docus/496/series1k2_201004.pdf</text:a></text:p>
        </text:list-item>
      </text:list>
      <text:p text:style-name="P20"/>
      <text:p text:style-name="P12">Pricing</text:p>
      <text:list text:continue-numbering="true" text:style-name="L1">
        <text:list-item>
          <text:p text:style-name="P33"><text:a xlink:type="simple" xlink:href="https://jlcpcb.com/parts" text:style-name="Internet_20_link" text:visited-style-name="Visited_20_Internet_20_Link">https://jlcpcb.com/parts</text:a></text:p>
        </text:list-item>
        <text:list-item>
          <text:p text:style-name="P33"><text:a xlink:type="simple" xlink:href="https://jlcpcb.com/partdetail/TexasInstruments-SN74CBT3253CDBR/C2674583" text:style-name="Internet_20_link" text:visited-style-name="Visited_20_Internet_20_Link">https://jlcpcb.com/partdetail/TexasInstruments-SN74CBT3253CDBR/C2674583</text:a></text:p>
        </text:list-item>
        <text:list-item>
          <text:p text:style-name="P33"><text:a xlink:type="simple" xlink:href="https://jlcpcb.com/partdetail/TexasInstruments-PCM1808PWR/C55513" text:style-name="Internet_20_link" text:visited-style-name="Visited_20_Internet_20_Link">https://jlcpcb.com/partdetail/TexasInstruments-PCM1808PWR/C55513</text:a></text:p>
        </text:list-item>
        <text:list-item>
          <text:p text:style-name="P33"><text:a xlink:type="simple" xlink:href="https://jlcpcb.com/partdetail/TexasInstruments-INA821IDR/C2060822" text:style-name="Internet_20_link" text:visited-style-name="Visited_20_Internet_20_Link">https://jlcpcb.com/partdetail/TexasInstruments-INA821IDR/C2060822</text:a></text:p>
        </text:list-item>
        <text:list-item>
          <text:p text:style-name="P33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33"><text:a xlink:type="simple" xlink:href="https://jlcpcb.com/partdetail/TexasInstruments-OPA1612AIDR/C94590" text:style-name="Internet_20_link" text:visited-style-name="Visited_20_Internet_20_Link">https://jlcpcb.com/partdetail/TexasInstruments-OPA1612AIDR/C94590</text:a></text:p>
        </text:list-item>
        <text:list-item>
          <text:p text:style-name="P33"><text:a xlink:type="simple" xlink:href="https://jlcpcb.com/partdetail/HRE-CSA1206C0G104J500NT/C52147198" text:style-name="Internet_20_link" text:visited-style-name="Visited_20_Internet_20_Link">https://jlcpcb.com/partdetail/HRE-CSA1206C0G104J500NT/C52147198</text:a></text:p>
        </text:list-item>
        <text:list-item>
          <text:p text:style-name="P33"><text:a xlink:type="simple" xlink:href="https://jlcpcb.com/partdetail/TexasInstruments-ISO7720DR/C486037" text:style-name="Internet_20_link" text:visited-style-name="Visited_20_Internet_20_Link">https://jlcpcb.com/partdetail/TexasInstruments-ISO7720DR/C486037</text:a></text:p>
        </text:list-item>
        <text:list-item>
          <text:p text:style-name="P33"/>
        </text:list-item>
        <text:list-item>
          <text:p text:style-name="P34"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29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29"><text:a xlink:type="simple" xlink:href="https://www.digikey.com/en/products/detail/microchip-technology/MCP1700-3302E-TO/652680" text:style-name="Internet_20_link" text:visited-style-name="Visited_20_Internet_20_Link">https://www.digikey.com/en/products/detail/microchip-technology/MCP1700-3302E-TO/652680</text:a></text:p>
        </text:list-item>
        <text:list-item>
          <text:p text:style-name="P29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29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29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29"><text:a xlink:type="simple" xlink:href="https://www.digikey.com/en/products/detail/texas-instruments/TPS72733DSER/2589820" text:style-name="Internet_20_link" text:visited-style-name="Visited_20_Internet_20_Link">https://www.digikey.com/en/products/detail/texas-instruments/TPS72733DSER/2589820</text:a></text:p>
        </text:list-item>
        <text:list-item>
          <text:p text:style-name="P29"><text:a xlink:type="simple" xlink:href="https://www.digikey.com/en/products/detail/eao/09-03290-01/8733106" text:style-name="Internet_20_link" text:visited-style-name="Visited_20_Internet_20_Link">https://www.digikey.com/en/products/detail/eao/09-03290-01/8733106</text:a></text:p>
        </text:list-item>
        <text:list-item>
          <text:p text:style-name="P29"><text:a xlink:type="simple" xlink:href="https://www.digikey.com/en/products/detail/texas-instruments/SN74CBT3253CPWR/864209" text:style-name="Internet_20_link" text:visited-style-name="Visited_20_Internet_20_Link"><text:soft-page-break/>https://www.digikey.com/en/products/detail/texas-instruments/SN74CBT3253CPWR/864209</text:a></text:p>
        </text:list-item>
        <text:list-item>
          <text:p text:style-name="P29"><text:a xlink:type="simple" xlink:href="https://www.digikey.com/en/products/detail/texas-instruments/SN74CBT3253CDR/864208" text:style-name="Internet_20_link" text:visited-style-name="Visited_20_Internet_20_Link">https://www.digikey.com/en/products/detail/texas-instruments/SN74CBT3253CDR/864208</text:a></text:p>
        </text:list-item>
        <text:list-item>
          <text:p text:style-name="P29"><text:a xlink:type="simple" xlink:href="https://www.digikey.com/en/products/detail/te-connectivity-linx/BAT-HLD-012-SMT/3044013" text:style-name="Internet_20_link" text:visited-style-name="Visited_20_Internet_20_Link">https://www.digikey.com/en/products/detail/te-connectivity-linx/BAT-HLD-012-SMT/3044013</text:a></text:p>
        </text:list-item>
        <text:list-item>
          <text:p text:style-name="P29"/>
        </text:list-item>
      </text:list>
      <text:p text:style-name="P3"/>
      <text:p text:style-name="P10">Software</text:p>
      <text:p text:style-name="P12">Languages</text:p>
      <text:p text:style-name="P17">Micropython</text:p>
      <text:list text:continue-numbering="true" text:style-name="L1">
        <text:list-item>
          <text:p text:style-name="P29"/>
        </text:list-item>
      </text:list>
      <text:p text:style-name="P17">C</text:p>
      <text:list text:continue-numbering="true" text:style-name="L1">
        <text:list-item>
          <text:p text:style-name="P29"/>
        </text:list-item>
      </text:list>
      <text:p text:style-name="P3"/>
      <text:p text:style-name="P14">Testing</text:p>
      <text:p text:style-name="P19">LTSpice</text:p>
      <text:list text:continue-numbering="true" text:style-name="L1">
        <text:list-item>
          <text:p text:style-name="P29"/>
        </text:list-item>
      </text:list>
      <text:p text:style-name="P19">Quisk</text:p>
      <text:list text:continue-numbering="true" text:style-name="L1">
        <text:list-item>
          <text:p text:style-name="P41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41"><text:a xlink:type="simple" xlink:href="https://james.ahlstrom.name/quisk/docs.html" text:style-name="Internet_20_link" text:visited-style-name="Visited_20_Internet_20_Link">https://james.ahlstrom.name/quisk/docs.html</text:a></text:p>
        </text:list-item>
        <text:list-item>
          <text:p text:style-name="P41"><text:a xlink:type="simple" xlink:href="https://james.ahlstrom.name/quisk/help.html" text:style-name="Internet_20_link" text:visited-style-name="Visited_20_Internet_20_Link">https://james.ahlstrom.name/quisk/help.html</text:a></text:p>
        </text:list-item>
      </text:list>
      <text:p text:style-name="P19"><text:a xlink:type="simple" xlink:href="https://james.ahlstrom.name/quisk/help.html" text:style-name="Internet_20_link" text:visited-style-name="Visited_20_Internet_20_Link"/></text:p>
      <text:p text:style-name="P19"/>
      <text:p text:style-name="P12">C<text:span text:style-name="T3">entral Processing Unit</text:span> Scheme</text:p>
      <text:p text:style-name="P17">Control System</text:p>
      <text:list text:continue-numbering="true" text:style-name="L1">
        <text:list-item>
          <text:p text:style-name="P29"/>
        </text:list-item>
      </text:list>
      <text:p text:style-name="P18">User Interface</text:p>
      <text:list text:continue-numbering="true" text:style-name="L1">
        <text:list-item>
          <text:p text:style-name="P35"/>
        </text:list-item>
        <text:list-item>
          <text:p text:style-name="P35"/>
        </text:list-item>
      </text:list>
      <text:p text:style-name="P5"/>
      <text:p text:style-name="P11">Artificial Intelligence Tools</text:p>
      <text:list text:continue-numbering="true" text:style-name="L1">
        <text:list-item>
          <text:p text:style-name="P28"><text:a xlink:type="simple" xlink:href="https://gemini.google.com/app/" text:style-name="Internet_20_link" text:visited-style-name="Visited_20_Internet_20_Link">https://gemini.google.com/app/</text:a></text:p>
        </text:list-item>
        <text:list-item>
          <text:p text:style-name="P28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28"><text:a xlink:type="simple" xlink:href="https://chatgpt.com/" text:style-name="Internet_20_link" text:visited-style-name="Visited_20_Internet_20_Link">https://chatgpt.com/</text:a></text:p>
        </text:list-item>
        <text:list-item>
          <text:p text:style-name="P28"><text:a xlink:type="simple" xlink:href="https://grok.com/" text:style-name="Internet_20_link" text:visited-style-name="Visited_20_Internet_20_Link">https://grok.com/</text:a></text:p>
        </text:list-item>
      </text:list>
      <text:p text:style-name="P6"/>
      <text:p text:style-name="P11">Miscellaneous</text:p>
      <text:list text:continue-numbering="true" text:style-name="L1">
        <text:list-item>
          <text:p text:style-name="P28"><text:a xlink:type="simple" xlink:href="https://www.scribbr.com/ieee/ieee-reference-page/" text:style-name="Internet_20_link" text:visited-style-name="Visited_20_Internet_20_Link">https://www.scribbr.com/ieee/ieee-reference-page/</text:a></text:p>
        </text:list-item>
        <text:list-item>
          <text:p text:style-name="P28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28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28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28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28"><text:a xlink:type="simple" xlink:href="https://www.digikey.com/en/help-support/place-an-order/product-lead-time" text:style-name="Internet_20_link" text:visited-style-name="Visited_20_Internet_20_Link">https://www.digikey.com/en/help-support/place-an-order/product-lead-time</text:a></text:p>
        </text:list-item>
        <text:list-item>
          <text:p text:style-name="P28"><text:a xlink:type="simple" xlink:href="https://markimicrowave.com/technical-resources/tools/lc-filter-design-tool/" text:style-name="Internet_20_link" text:visited-style-name="Visited_20_Internet_20_Link">https://markimicrowave.com/technical-resources/tools/lc-filter-design-tool/</text:a></text:p>
        </text:list-item>
        <text:list-item>
          <text:p text:style-name="P36"><text:a xlink:type="simple" xlink:href="http://www.listenersguide.org.uk/swl/measuring-radio-signal-strength/" text:style-name="Internet_20_link" text:visited-style-name="Visited_20_Internet_20_Link"><text:span text:style-name="T4">http://www.listenersguide.org.uk/swl/measuring-radio-signal-strength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4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5-01T16:18:08.262262611</dc:date>
    <meta:editing-duration>PT18H20M3S</meta:editing-duration>
    <meta:editing-cycles>45</meta:editing-cycles>
    <meta:generator>LibreOffice/24.2.7.2$Linux_X86_64 LibreOffice_project/420$Build-2</meta:generator>
    <meta:document-statistic meta:table-count="0" meta:image-count="0" meta:object-count="0" meta:page-count="4" meta:paragraph-count="145" meta:word-count="278" meta:character-count="6541" meta:non-whitespace-character-count="6485"/>
  </office:meta>
</office:document-meta>
</file>