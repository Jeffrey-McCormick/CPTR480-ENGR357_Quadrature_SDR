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officeooo:rsid="00173bf9" officeooo:paragraph-rsid="0052fe58"/>
    </style:style>
    <style:style style:name="P11" style:family="paragraph" style:parent-style-name="Standard">
      <style:paragraph-properties fo:text-align="start" style:justify-single-word="false"/>
      <style:text-properties officeooo:rsid="00173bf9" officeooo:paragraph-rsid="005891d9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8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9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20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2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3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4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5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6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7" style:family="paragraph" style:parent-style-name="Standard">
      <style:paragraph-properties fo:text-align="start" style:justify-single-word="false"/>
      <style:text-properties officeooo:paragraph-rsid="005891d9"/>
    </style:style>
    <style:style style:name="P28" style:family="paragraph" style:parent-style-name="Standard">
      <style:paragraph-properties fo:text-align="start" style:justify-single-word="false"/>
      <style:text-properties officeooo:rsid="0052fe58" officeooo:paragraph-rsid="0052fe58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30" style:family="paragraph" style:parent-style-name="Standard">
      <style:paragraph-properties fo:text-align="start" style:justify-single-word="false"/>
      <style:text-properties officeooo:rsid="005891d9" officeooo:paragraph-rsid="005891d9"/>
    </style:style>
    <style:style style:name="P31" style:family="paragraph" style:parent-style-name="Standard">
      <style:paragraph-properties fo:text-align="start" style:justify-single-word="false"/>
      <style:text-properties officeooo:rsid="005bd9f0" officeooo:paragraph-rsid="005bd9f0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5bd9f0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3bf9" officeooo:paragraph-rsid="005891d9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73bf9" officeooo:paragraph-rsid="0052fe58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73bf9" officeooo:paragraph-rsid="005db277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73bf9" officeooo:paragraph-rsid="00618a68"/>
    </style:style>
    <style:style style:name="P48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51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52" style:family="paragraph" style:parent-style-name="Standard">
      <style:paragraph-properties fo:text-align="start" style:justify-single-word="false"/>
      <style:text-properties officeooo:rsid="005db277" officeooo:paragraph-rsid="005db277"/>
    </style:style>
    <style:style style:name="P53" style:family="paragraph" style:parent-style-name="Standard">
      <style:paragraph-properties fo:text-align="start" style:justify-single-word="false"/>
      <style:text-properties officeooo:rsid="00618a68" officeooo:paragraph-rsid="00618a68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style:style style:name="T9" style:family="text">
      <style:text-properties officeooo:rsid="005891d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2">Design <text:span text:style-name="T2">Planning</text:span></text:p>
      <text:p text:style-name="P14">What has been done before</text:p>
      <text:list text:style-name="L1">
        <text:list-item>
          <text:p text:style-name="P32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32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32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32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32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32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32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32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32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32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32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32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32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32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32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32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32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32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7">Theory</text:p>
      <text:list text:continue-numbering="true" text:style-name="L1">
        <text:list-item>
          <text:p text:style-name="P33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33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33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4">How <text:span text:style-name="T3">different </text:span>SDRs work (Block Diagram)</text:p>
      <text:list text:continue-numbering="true" text:style-name="L1">
        <text:list-item>
          <text:p text:style-name="P34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34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5">Design Recommendations</text:p>
      <text:list text:continue-numbering="true" text:style-name="L1">
        <text:list-item>
          <text:p text:style-name="P35"/>
        </text:list-item>
      </text:list>
      <text:p text:style-name="P4"/>
      <text:p text:style-name="P3"/>
      <text:p text:style-name="P12">Hardware</text:p>
      <text:p text:style-name="P14">Capabilities/Trade-offs</text:p>
      <text:p text:style-name="P18">Bypass capacitors</text:p>
      <text:list text:continue-numbering="true" text:style-name="L1">
        <text:list-item>
          <text:p text:style-name="P35"/>
        </text:list-item>
      </text:list>
      <text:p text:style-name="P4"/>
      <text:p text:style-name="P31">Ferrite Beads</text:p>
      <text:list text:continue-numbering="true" text:style-name="L1">
        <text:list-item>
          <text:p text:style-name="P36"><text:a xlink:type="simple" xlink:href="https://jlcpcb.com/partdetail/Sunlord-GZ2012D601TF/C1017" text:style-name="Internet_20_link" text:visited-style-name="Visited_20_Internet_20_Link">https://jlcpcb.com/partdetail/Sunlord-GZ2012D601TF/C1017</text:a></text:p>
        </text:list-item>
        <text:list-item>
          <text:p text:style-name="P36"/>
        </text:list-item>
      </text:list>
      <text:p text:style-name="P26"/>
      <text:p text:style-name="P26">OLED Display</text:p>
      <text:list text:continue-numbering="true" text:style-name="L1">
        <text:list-item>
          <text:p text:style-name="P37"><text:a xlink:type="simple" xlink:href="https://www.elecrow.com/i2c-096-oled-128x64-blueyellow-p-1086.html?gad_campaignid=23136944328" text:style-name="Internet_20_link" text:visited-style-name="Visited_20_Internet_20_Link"><text:soft-page-break/>https://www.elecrow.com/i2c-096-oled-128x64-blueyellow-p-1086.html?gad_campaignid=23136944328</text:a></text:p>
        </text:list-item>
        <text:list-item>
          <text:p text:style-name="P37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7"/>
        </text:list-item>
      </text:list>
      <text:p text:style-name="P25"/>
      <text:p text:style-name="P25">Analog to Digital Converter</text:p>
      <text:list text:continue-numbering="true" text:style-name="L1">
        <text:list-item>
          <text:p text:style-name="P49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9"/>
      <text:p text:style-name="P30">Digital to Analog Converter (Audio Out)</text:p>
      <text:list text:continue-numbering="true" text:style-name="L1">
        <text:list-item>
          <text:p text:style-name="P38"><text:a xlink:type="simple" xlink:href="https://www.ti.com/lit/ds/symlink/pcm5102a.pdf" text:style-name="Internet_20_link" text:visited-style-name="Visited_20_Internet_20_Link">https://www.ti.com/lit/ds/symlink/pcm5102a.pdf</text:a></text:p>
        </text:list-item>
        <text:list-item>
          <text:p text:style-name="P38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</text:list>
      <text:p text:style-name="P11"/>
      <text:p text:style-name="P27"><text:span text:style-name="T9">Audio Jack (</text:span>3.5mm TRS (Tip-Ring-Sleeve) Stereo Jack<text:span text:style-name="T9">)</text:span></text:p>
      <text:list text:continue-numbering="true" text:style-name="L1">
        <text:list-item>
          <text:p text:style-name="P38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38"><text:a xlink:type="simple" xlink:href="https://www.lcsc.com/datasheet/C18594.pdf" text:style-name="Internet_20_link" text:visited-style-name="Visited_20_Internet_20_Link">https://www.lcsc.com/datasheet/C18594.pdf</text:a></text:p>
        </text:list-item>
        <text:list-item>
          <text:p text:style-name="P38"/>
        </text:list-item>
      </text:list>
      <text:p text:style-name="P11"/>
      <text:p text:style-name="P18">Band-pass Filters</text:p>
      <text:list text:continue-numbering="true" text:style-name="L1">
        <text:list-item>
          <text:p text:style-name="P35"/>
        </text:list-item>
      </text:list>
      <text:p text:style-name="P4"/>
      <text:p text:style-name="P18">Transformers (Ferrite Toroids)</text:p>
      <text:list text:continue-numbering="true" text:style-name="L1">
        <text:list-item>
          <text:p text:style-name="P35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35"/>
        </text:list-item>
      </text:list>
      <text:p text:style-name="P4"/>
      <text:p text:style-name="P18">External power/regulation</text:p>
      <text:list text:continue-numbering="true" text:style-name="L1">
        <text:list-item>
          <text:p text:style-name="P35"/>
        </text:list-item>
      </text:list>
      <text:p text:style-name="P4"/>
      <text:p text:style-name="P19">Rotary Encoder Frequency Tuning</text:p>
      <text:list text:continue-numbering="true" text:style-name="L1">
        <text:list-item>
          <text:p text:style-name="P35"/>
        </text:list-item>
      </text:list>
      <text:p text:style-name="P4"/>
      <text:p text:style-name="P53">Iron core (hand wound inductors)</text:p>
      <text:list text:continue-numbering="true" text:style-name="L1">
        <text:list-item>
          <text:p text:style-name="P47"><text:a xlink:type="simple" xlink:href="https://www.rf-microwave.com/resources/products_attachments/6128ffba1982b.pdf" text:style-name="Internet_20_link" text:visited-style-name="Visited_20_Internet_20_Link">https://www.rf-microwave.com/resources/products_attachments/6128ffba1982b.pdf</text:a></text:p>
        </text:list-item>
        <text:list-item>
          <text:p text:style-name="P47"/>
        </text:list-item>
      </text:list>
      <text:p text:style-name="P19"/>
      <text:p text:style-name="P19">External Sound Cards/<text:span text:style-name="T3">Speakers</text:span></text:p>
      <text:list text:continue-numbering="true" text:style-name="L1">
        <text:list-item>
          <text:p text:style-name="P35"/>
        </text:list-item>
      </text:list>
      <text:p text:style-name="P4"/>
      <text:p text:style-name="P52">Switching Diode(s)</text:p>
      <text:list text:continue-numbering="true" text:style-name="L1">
        <text:list-item>
          <text:p text:style-name="P46"><text:a xlink:type="simple" xlink:href="https://jlcpcb.com/api/file/downloadByFileSystemAccessId/8586175988833533952" text:style-name="Internet_20_link" text:visited-style-name="Visited_20_Internet_20_Link">https://jlcpcb.com/api/file/downloadByFileSystemAccessId/8586175988833533952</text:a></text:p>
        </text:list-item>
        <text:list-item>
          <text:p text:style-name="P46"><text:a xlink:type="simple" xlink:href="https://www.lcsc.com/datasheet/C2500.pdf" text:style-name="Internet_20_link" text:visited-style-name="Visited_20_Internet_20_Link">https://www.lcsc.com/datasheet/C2500.pdf</text:a></text:p>
        </text:list-item>
        <text:list-item>
          <text:p text:style-name="P46"/>
        </text:list-item>
      </text:list>
      <text:p text:style-name="P4"/>
      <text:p text:style-name="P28">Digital Isolator</text:p>
      <text:list text:continue-numbering="true" text:style-name="L1">
        <text:list-item>
          <text:p text:style-name="P39"><text:a xlink:type="simple" xlink:href="https://www.ti.com/lit/ds/symlink/iso7720.pdf" text:style-name="Internet_20_link" text:visited-style-name="Visited_20_Internet_20_Link">https://www.ti.com/lit/ds/symlink/iso7720.pdf</text:a></text:p>
        </text:list-item>
        <text:list-item>
          <text:p text:style-name="P39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39"/>
        </text:list-item>
      </text:list>
      <text:p text:style-name="P10"/>
      <text:p text:style-name="P19">Local Oscillators</text:p>
      <text:list text:continue-numbering="true" text:style-name="L1">
        <text:list-item>
          <text:p text:style-name="P35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5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35"><text:a xlink:type="simple" xlink:href="https://jlcpcb.com/partdetail/534662-49MD_24_576_20_10_10B/C518125" text:style-name="Internet_20_link" text:visited-style-name="Visited_20_Internet_20_Link"><text:soft-page-break/>https://jlcpcb.com/partdetail/534662-49MD_24_576_20_10_10B/C518125</text:a></text:p>
        </text:list-item>
        <text:list-item>
          <text:p text:style-name="P35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35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9">Mixers</text:p>
      <text:list text:continue-numbering="true" text:style-name="L1">
        <text:list-item>
          <text:p text:style-name="P35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35"/>
        </text:list-item>
      </text:list>
      <text:p text:style-name="P4"/>
      <text:p text:style-name="P19">Amplifiers</text:p>
      <text:list text:continue-numbering="true" text:style-name="L1">
        <text:list-item>
          <text:p text:style-name="P35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35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35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35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35"/>
        </text:list-item>
      </text:list>
      <text:p text:style-name="P4"/>
      <text:p text:style-name="P19">Low-Pass Filters for Audio</text:p>
      <text:list text:continue-numbering="true" text:style-name="L1">
        <text:list-item>
          <text:p text:style-name="P35"><text:s text:c="2"/></text:p>
        </text:list-item>
        <text:list-item>
          <text:p text:style-name="P35"/>
        </text:list-item>
      </text:list>
      <text:p text:style-name="P4"/>
      <text:p text:style-name="P22">Batteries</text:p>
      <text:list text:continue-numbering="true" text:style-name="L1">
        <text:list-item>
          <text:p text:style-name="P40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40"><text:a xlink:type="simple" xlink:href="https://www.te.com/commerce/DocumentDelivery/DDEController?Action=srchrtrv&amp;DocNm=BAT-HLD-012-SMT&amp;DocType=Data+Sheet&amp;DocLang=English&amp;DocFormat=pdf&amp;PartCntxt=BAT-HLD-012-SMT" text:style-name="Internet_20_link" text:visited-style-name="Visited_20_Internet_20_Link">https://www.te.com/commerce/DocumentDelivery/DDEController?Action=srchrtrv&amp;DocNm=BAT-HLD-012-SMT&amp;DocType=Data+Sheet&amp;DocLang=English&amp;DocFormat=pdf&amp;PartCntxt=BAT-HLD-012-SMT</text:a></text:p>
        </text:list-item>
        <text:list-item>
          <text:p text:style-name="P40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40"/>
        </text:list-item>
      </text:list>
      <text:p text:style-name="P18"/>
      <text:p text:style-name="P22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40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40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40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3">Microprocessor</text:p>
      <text:list text:continue-numbering="true" text:style-name="L1">
        <text:list-item>
          <text:p text:style-name="P41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41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41"/>
        </text:list-item>
      </text:list>
      <text:p text:style-name="P9"/>
      <text:p text:style-name="P24">Switches/Buttons</text:p>
      <text:list text:continue-numbering="true" text:style-name="L1">
        <text:list-item>
          <text:p text:style-name="P41"><text:a xlink:type="simple" xlink:href="https://mm.digikey.com/Volume0/opasdata/d220001/medias/docus/496/series1k2_201004.pdf" text:style-name="Internet_20_link" text:visited-style-name="Visited_20_Internet_20_Link"><text:soft-page-break/>https://mm.digikey.com/Volume0/opasdata/d220001/medias/docus/496/series1k2_201004.pdf</text:a></text:p>
        </text:list-item>
        <text:list-item>
          <text:p text:style-name="P41"><text:a xlink:type="simple" xlink:href="https://jlcpcb.com/api/file/downloadByFileSystemAccessId/8588897813626802176" text:style-name="Internet_20_link" text:visited-style-name="Visited_20_Internet_20_Link">https://jlcpcb.com/api/file/downloadByFileSystemAccessId/8588897813626802176</text:a></text:p>
        </text:list-item>
        <text:list-item>
          <text:p text:style-name="P41"><text:a xlink:type="simple" xlink:href="https://jlcpcb.com/parts/componentSearch?searchTxt=RotaryEncoder_Alps_EC11E" text:style-name="Internet_20_link" text:visited-style-name="Visited_20_Internet_20_Link">https://jlcpcb.com/parts/componentSearch?searchTxt=RotaryEncoder_Alps_EC11E</text:a></text:p>
        </text:list-item>
        <text:list-item>
          <text:p text:style-name="P41"/>
        </text:list-item>
      </text:list>
      <text:p text:style-name="P22"/>
      <text:p text:style-name="P14">Pricing</text:p>
      <text:list text:continue-numbering="true" text:style-name="L1">
        <text:list-item>
          <text:p text:style-name="P42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42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42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42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42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42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42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42"><text:a xlink:type="simple" xlink:href="https://jlcpcb.com/partdetail/TexasInstruments-ISO7720DR/C486037" text:style-name="Internet_20_link" text:visited-style-name="Visited_20_Internet_20_Link">https://jlcpcb.com/partdetail/TexasInstruments-ISO7720DR/C486037</text:a></text:p>
        </text:list-item>
        <text:list-item>
          <text:p text:style-name="P42"><text:a xlink:type="simple" xlink:href="https://jlcpcb.com/partdetail/TexasInstruments-PCM5102APWR/C107671" text:style-name="Internet_20_link" text:visited-style-name="Visited_20_Internet_20_Link">https://jlcpcb.com/partdetail/TexasInstruments-PCM5102APWR/C107671</text:a></text:p>
        </text:list-item>
        <text:list-item>
          <text:p text:style-name="P42"><text:a xlink:type="simple" xlink:href="https://jlcpcb.com/partdetail/19296-PJ_320BSurfaceMount/C18594" text:style-name="Internet_20_link" text:visited-style-name="Visited_20_Internet_20_Link">https://jlcpcb.com/partdetail/19296-PJ_320BSurfaceMount/C18594</text:a></text:p>
        </text:list-item>
        <text:list-item>
          <text:p text:style-name="P42"><text:a xlink:type="simple" xlink:href="https://jlcpcb.com/parts/componentSearch?searchTxt=BAV99" text:style-name="Internet_20_link" text:visited-style-name="Visited_20_Internet_20_Link">https://jlcpcb.com/parts/componentSearch?searchTxt=BAV99</text:a></text:p>
        </text:list-item>
        <text:list-item>
          <text:p text:style-name="P42"/>
        </text:list-item>
        <text:list-item>
          <text:p text:style-name="P43"><text:a xlink:type="simple" xlink:href="https://www.ti.com/product/INA821" text:style-name="Internet_20_link" text:visited-style-name="Visited_20_Internet_20_Link"/></text:p>
        </text:list-item>
        <text:list-item>
          <text:p text:style-name="P43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35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35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35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35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35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35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35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35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35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35"><text:a xlink:type="simple" xlink:href="https://www.digikey.com/en/products/detail/te-connectivity-linx/BAT-HLD-012-SMT/3044013" text:style-name="Internet_20_link" text:visited-style-name="Visited_20_Internet_20_Link">https://www.digikey.com/en/products/detail/te-connectivity-linx/BAT-HLD-012-SMT/3044013</text:a></text:p>
        </text:list-item>
        <text:list-item>
          <text:p text:style-name="P35"/>
        </text:list-item>
      </text:list>
      <text:p text:style-name="P3"/>
      <text:p text:style-name="P12">Software</text:p>
      <text:p text:style-name="P14">Languages</text:p>
      <text:p text:style-name="P19">Micropython</text:p>
      <text:list text:continue-numbering="true" text:style-name="L1">
        <text:list-item>
          <text:p text:style-name="P35"/>
        </text:list-item>
      </text:list>
      <text:p text:style-name="P19">C</text:p>
      <text:list text:continue-numbering="true" text:style-name="L1">
        <text:list-item>
          <text:p text:style-name="P35"/>
        </text:list-item>
      </text:list>
      <text:p text:style-name="P3"/>
      <text:p text:style-name="P16">Testing</text:p>
      <text:p text:style-name="P21">LTSpice</text:p>
      <text:list text:continue-numbering="true" text:style-name="L1">
        <text:list-item>
          <text:p text:style-name="P35"/>
        </text:list-item>
      </text:list>
      <text:p text:style-name="P21">Quisk</text:p>
      <text:list text:continue-numbering="true" text:style-name="L1">
        <text:list-item>
          <text:p text:style-name="P50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50"><text:a xlink:type="simple" xlink:href="https://james.ahlstrom.name/quisk/docs.html" text:style-name="Internet_20_link" text:visited-style-name="Visited_20_Internet_20_Link"><text:soft-page-break/>https://james.ahlstrom.name/quisk/docs.html</text:a></text:p>
        </text:list-item>
        <text:list-item>
          <text:p text:style-name="P50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21"><text:a xlink:type="simple" xlink:href="https://james.ahlstrom.name/quisk/help.html" text:style-name="Internet_20_link" text:visited-style-name="Visited_20_Internet_20_Link"/></text:p>
      <text:p text:style-name="P21"/>
      <text:p text:style-name="P14">C<text:span text:style-name="T3">entral Processing Unit</text:span> Scheme</text:p>
      <text:p text:style-name="P19">Control System</text:p>
      <text:list text:continue-numbering="true" text:style-name="L1">
        <text:list-item>
          <text:p text:style-name="P35"/>
        </text:list-item>
      </text:list>
      <text:p text:style-name="P20">User Interface</text:p>
      <text:list text:continue-numbering="true" text:style-name="L1">
        <text:list-item>
          <text:p text:style-name="P44"/>
        </text:list-item>
        <text:list-item>
          <text:p text:style-name="P44"/>
        </text:list-item>
      </text:list>
      <text:p text:style-name="P5"/>
      <text:p text:style-name="P13">Artificial Intelligence Tools</text:p>
      <text:list text:continue-numbering="true" text:style-name="L1">
        <text:list-item>
          <text:p text:style-name="P34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34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34"><text:a xlink:type="simple" xlink:href="https://chatgpt.com/" text:style-name="Internet_20_link" text:visited-style-name="Visited_20_Internet_20_Link">https://chatgpt.com/</text:a></text:p>
        </text:list-item>
        <text:list-item>
          <text:p text:style-name="P34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3">Miscellaneous</text:p>
      <text:list text:continue-numbering="true" text:style-name="L1">
        <text:list-item>
          <text:p text:style-name="P34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34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34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34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34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34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34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45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5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5-04T15:14:43.612648776</dc:date>
    <meta:editing-duration>P1DT4H36M2S</meta:editing-duration>
    <meta:editing-cycles>54</meta:editing-cycles>
    <meta:generator>LibreOffice/24.2.7.2$Linux_X86_64 LibreOffice_project/420$Build-2</meta:generator>
    <meta:document-statistic meta:table-count="0" meta:image-count="0" meta:object-count="0" meta:page-count="5" meta:paragraph-count="169" meta:word-count="332" meta:character-count="7589" meta:non-whitespace-character-count="7516"/>
  </office:meta>
</office:document-meta>
</file>